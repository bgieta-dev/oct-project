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officeooo:rsid="0007082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Aktualny etap projektu</text:h>
      <text:p text:style-name="Text_20_body">Etap III (19.05–15.06): Eksperymenty transformerowe i przygotowanie raportu częściowego. Równolegle zbieram materiały do wymaganego raportu (min. 15 stron).</text:p>
      <text:h text:style-name="Heading_20_3" text:outline-level="3">2. Co udało się zrobić (ostatnie 2 tygodnie)</text:h>
      <text:list text:style-name="L1">
        <text:list-item>
          <text:p text:style-name="P1">Eksperymenty z modelami SegFormer:</text:p>
          <text:list>
            <text:list-item>
              <text:p text:style-name="P2">Przeszedłem z prostego modelu baseline na większe architektury: SegFormer-B2 oraz SegFormer-B3.</text:p>
            </text:list-item>
            <text:list-item>
              <text:p text:style-name="P2">Rozwiązałem problem początkowej niestabilności treningu (Class Collapse, mIoU na poziomie 0.24) poprzez wdrożenie 10 epok LR Warmup oraz harmonogramu Cosine Annealing.</text:p>
            </text:list-item>
            <text:list-item>
              <text:p text:style-name="P2"><text:span text:style-name="T1">Wyniki testów:</text:span> Model SegFormer-B2 osiągnął satysfakcjonujący wynik mIoU: 0.7322 (mDice: 0.83). Większy wariant B3 wykazał tendencję do overfittingu (spadek mIoU do 0.7080) – model zaczął uczyć się szumu zamiast anatomii.</text:p>
            </text:list-item>
          </text:list>
        </text:list-item>
        <text:list-item>
          <text:p text:style-name="P1"><text:span text:style-name="T2">R</text:span>ozszerzenie wejścia o tryb 2.5D:</text:p>
          <text:list>
            <text:list-item>
              <text:p text:style-name="P2"><text:span text:style-name="T2">Z</text:span>modyfikowałem pipeline danych pod kątem transformerów, wprowadzając wejście 2.5D (kontekst 3 sąsiednich skanów jako kanały).</text:p>
            </text:list-item>
            <text:list-item>
              <text:p text:style-name="P2">Hipoteza badawcza zakłada, że mechanizm Self-Attention w transformerach odniesie dużą korzyść z kontekstu przestrzennego, co przełoży się na lepszą spójność pionową segmentacji. Kod jest dostępny w naszym wspólnym repozytorium, więc Eryk również będzie mógł wykorzystać ten loader w swoich modelach CNN.</text:p>
            </text:list-item>
          </text:list>
        </text:list-item>
        <text:list-item>
          <text:p text:style-name="P1">Rozbudowa ewaluacji i ujednolicenie danych:</text:p>
          <text:list>
            <text:list-item>
              <text:p text:style-name="P2">Wdrożyłem kliniczną normalizację intensywności (percentyle 1-99) oraz zaawansowane metryki: odległość Hausdorffa (HD95) i Average Surface Distance (ASD).</text:p>
            </text:list-item>
            <text:list-item>
              <text:p text:style-name="P2">Dodałem metrykę Boundary Precision (BP), automatyczne zliczanie obszarów płynu oraz moduł zapisu najtrudniejszych przypadków (failures/).</text:p>
            </text:list-item>
            <text:list-item>
              <text:p text:style-name="P2">Zsynchronizowaliśmy klasy i nazewnictwo biomarkerów zgodnie ze standardem RETOUCH (0=tło, 1=IRF, 2=SRF, 3=PED).</text:p>
            </text:list-item>
          </text:list>
        </text:list-item>
      </text:list>
      <text:h text:style-name="Heading_20_3" text:outline-level="3">3. Stan prac na dzień dzisiejszy (22.05)</text:h>
      <text:p text:style-name="Text_20_body">Obecnie trwa Test 8: konfiguracja SegFormer-B2 + funkcja straty Tversky Loss (zorientowana na poprawę wykrywania małych zmian IRF) + CLAHE (wyostrzanie granic PED). Trening jest w toku, wieczorem przeanalizuję pierwsze stabilne logi w Weights &amp; Biases.</text:p>
      <text:h text:style-name="Heading_20_3" text:outline-level="3"><text:soft-page-break/>4. Dokładny plan na najbliższy tydzień</text:h>
      <text:list text:style-name="L2">
        <text:list-item>
          <text:p text:style-name="P3"><text:span text:style-name="T1">Analiza Testu 8:</text:span> Weryfikacja wpływu Tversky Loss na czułość wykrywania małych cyst oraz analiza map uwagi (Attention Maps) dla tego wariantu.</text:p>
        </text:list-item>
        <text:list-item>
          <text:p text:style-name="P3"><text:span text:style-name="T1">Wdrożenie SwinUNETR:</text:span> Rozpoczęcie prac nad drugą architekturą z planu pracy z wykorzystaniem frameworku MONAI. W pierwszej kolejności uruchomię baseline 2D, aby mieć punkt odniesienia do SegFormera.</text:p>
        </text:list-item>
        <text:list-item>
          <text:p text:style-name="P3"><text:span text:style-name="T1">Prace nad raportem czerwcowym:</text:span> Przygotowanie struktury dokumentu na Overleafie (opis teoretyczny transformerów, mechanizmu uwagi oraz dotychczasowych wyników SegFormera).</text:p>
        </text:list-item>
      </text:list>
      <text:p text:style-name="Text_20_body">Aktualnie mniejszy model B2 radzi sobie lepiej pod kątem generalizacji niż B3, dlatego najbliższe dni poświęcę na wyciągnięcie z niego maksimum skuteczności, równolegle uruchamiając baseline dla SwinUNET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11:00:55.255302850</meta:creation-date>
    <dc:date>2026-05-22T11:07:21.918956716</dc:date>
    <meta:editing-duration>PT6M28S</meta:editing-duration>
    <meta:editing-cycles>1</meta:editing-cycles>
    <meta:document-statistic meta:table-count="0" meta:image-count="0" meta:object-count="0" meta:page-count="2" meta:paragraph-count="21" meta:word-count="362" meta:character-count="2703" meta:non-whitespace-character-count="2376"/>
    <meta:generator>LibreOffice/25.2.3.2$Linux_X86_64 LibreOffice_project/520$Build-2</meta:generator>
  </office:meta>
</office:document-meta>
</file>